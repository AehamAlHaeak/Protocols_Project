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2E0000030FCCD480B3.png" manifest:media-type="image/png"/>
  <manifest:file-entry manifest:full-path="Pictures/100000010000062E0000030F4C98961B.png" manifest:media-type="image/png"/>
  <manifest:file-entry manifest:full-path="Pictures/100000010000062E0000030F422B3340.png" manifest:media-type="image/png"/>
  <manifest:file-entry manifest:full-path="Pictures/100000010000062E0000030F0171180A.png" manifest:media-type="image/png"/>
  <manifest:file-entry manifest:full-path="Pictures/100000010000062E0000030FEF0A58ED.png" manifest:media-type="image/png"/>
  <manifest:file-entry manifest:full-path="Pictures/100000010000062E0000030FD91DEFC9.png" manifest:media-type="image/png"/>
  <manifest:file-entry manifest:full-path="Pictures/100000010000061E000002F43FBB67DD.png" manifest:media-type="image/png"/>
  <manifest:file-entry manifest:full-path="Pictures/10000001000005BD000002D96D77E2FB.png" manifest:media-type="image/png"/>
  <manifest:file-entry manifest:full-path="Pictures/100000010000049200000324A23D23DE.png" manifest:media-type="image/png"/>
  <manifest:file-entry manifest:full-path="Pictures/1000000100000685000002F9DBDF033C.png" manifest:media-type="image/png"/>
  <manifest:file-entry manifest:full-path="Pictures/1000000100000492000003244A4468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babb7"/>
    </style:style>
    <style:style style:name="P2" style:family="paragraph" style:parent-style-name="Standard">
      <style:paragraph-properties fo:text-align="end" style:justify-single-word="false"/>
      <style:text-properties officeooo:paragraph-rsid="000df5f6"/>
    </style:style>
    <style:style style:name="P3" style:family="paragraph" style:parent-style-name="Standard">
      <style:paragraph-properties fo:text-align="end" style:justify-single-word="false"/>
      <style:text-properties fo:color="#1c1c1c" loext:opacity="100%" fo:font-size="13pt" officeooo:paragraph-rsid="000babb7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officeooo:paragraph-rsid="000babb7"/>
    </style:style>
    <style:style style:name="P5" style:family="paragraph" style:parent-style-name="Standard">
      <style:paragraph-properties fo:text-align="center" style:justify-single-word="false"/>
      <style:text-properties officeooo:paragraph-rsid="000d5fca"/>
    </style:style>
    <style:style style:name="P6" style:family="paragraph" style:parent-style-name="Standard">
      <style:paragraph-properties fo:text-align="center" style:justify-single-word="false"/>
      <style:text-properties fo:font-size="9pt" officeooo:paragraph-rsid="000babb7" style:font-size-asian="7.84999990463257pt" style:font-size-complex="9pt"/>
    </style:style>
    <style:style style:name="P7" style:family="paragraph" style:parent-style-name="Standard">
      <style:paragraph-properties fo:text-align="end" style:justify-single-word="false"/>
      <style:text-properties fo:font-size="9pt" officeooo:paragraph-rsid="000babb7" style:font-size-asian="7.84999990463257pt" style:font-size-complex="9pt"/>
    </style:style>
    <style:style style:name="P8" style:family="paragraph" style:parent-style-name="Standard">
      <style:paragraph-properties fo:text-align="end" style:justify-single-word="false"/>
      <style:text-properties fo:font-size="11pt" officeooo:paragraph-rsid="000babb7" style:font-size-asian="9.60000038146973pt" style:font-size-complex="11pt"/>
    </style:style>
    <style:style style:name="P9" style:family="paragraph" style:parent-style-name="Standard">
      <style:paragraph-properties fo:text-align="end" style:justify-single-word="false"/>
      <style:text-properties fo:font-size="11pt" officeooo:rsid="000babb7" officeooo:paragraph-rsid="000babb7" style:font-size-asian="9.60000038146973pt" style:font-size-complex="11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1pt" officeooo:rsid="000babb7" officeooo:paragraph-rsid="000babb7" style:font-size-asian="9.60000038146973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d5fca"/>
    </style:style>
    <style:style style:name="P12" style:family="paragraph" style:parent-style-name="Standard">
      <style:paragraph-properties fo:text-align="start" style:justify-single-word="false"/>
      <style:text-properties officeooo:paragraph-rsid="000df5f6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0df5f6"/>
    </style:style>
    <style:style style:name="P14" style:family="paragraph" style:parent-style-name="Standard">
      <style:paragraph-properties fo:text-align="center" style:justify-single-word="false"/>
      <style:text-properties officeooo:rsid="000d5fca" officeooo:paragraph-rsid="000d5fca"/>
    </style:style>
    <style:style style:name="P15" style:family="paragraph" style:parent-style-name="Standard">
      <style:paragraph-properties fo:text-align="center" style:justify-single-word="false" fo:break-before="page"/>
      <style:text-properties officeooo:rsid="000d5fca" officeooo:paragraph-rsid="000d5fca"/>
    </style:style>
    <style:style style:name="P16" style:family="paragraph" style:parent-style-name="Standard">
      <style:paragraph-properties fo:text-align="end" style:justify-single-word="false"/>
      <style:text-properties officeooo:rsid="000d5fca" officeooo:paragraph-rsid="000d5fca"/>
    </style:style>
    <style:style style:name="P17" style:family="paragraph" style:parent-style-name="Standard">
      <style:paragraph-properties fo:text-align="end" style:justify-single-word="false"/>
      <style:text-properties officeooo:rsid="000d5fca" officeooo:paragraph-rsid="000df5f6"/>
    </style:style>
    <style:style style:name="P18" style:family="paragraph" style:parent-style-name="Standard">
      <style:paragraph-properties fo:text-align="end" style:justify-single-word="false"/>
      <style:text-properties officeooo:rsid="000df5f6" officeooo:paragraph-rsid="000df5f6"/>
    </style:style>
    <style:style style:name="P19" style:family="paragraph" style:parent-style-name="Standard" style:list-style-name="L3">
      <style:paragraph-properties fo:text-align="start" style:justify-single-word="false"/>
      <style:text-properties officeooo:rsid="000df5f6" officeooo:paragraph-rsid="000df5f6"/>
    </style:style>
    <style:style style:name="P20" style:family="paragraph" style:parent-style-name="Standard">
      <style:paragraph-properties fo:text-align="end" style:justify-single-word="false"/>
      <style:text-properties officeooo:rsid="000e499b" officeooo:paragraph-rsid="000e499b"/>
    </style:style>
    <style:style style:name="P21" style:family="paragraph" style:parent-style-name="Standard">
      <style:paragraph-properties fo:text-align="end" style:justify-single-word="false"/>
      <style:text-properties officeooo:rsid="000e499b" officeooo:paragraph-rsid="000edadf"/>
    </style:style>
    <style:style style:name="P22" style:family="paragraph" style:parent-style-name="Standard">
      <style:paragraph-properties fo:text-align="end" style:justify-single-word="false"/>
      <style:text-properties fo:color="#ff4000" loext:opacity="100%" fo:font-weight="bold" officeooo:rsid="000df5f6" officeooo:paragraph-rsid="000df5f6" fo:background-color="transparent" style:font-weight-asian="bold" style:font-weight-complex="bold"/>
    </style:style>
    <style:style style:name="P23" style:family="paragraph" style:parent-style-name="Standard">
      <style:paragraph-properties fo:text-align="end" style:justify-single-word="false"/>
      <style:text-properties fo:color="#ff4000" loext:opacity="100%" fo:font-weight="bold" officeooo:rsid="000f608f" officeooo:paragraph-rsid="000f6e48" style:font-weight-asian="bold" style:font-weight-complex="bold"/>
    </style:style>
    <style:style style:name="P24" style:family="paragraph" style:parent-style-name="Standard">
      <style:paragraph-properties fo:text-align="end" style:justify-single-word="false"/>
      <style:text-properties fo:color="#ff4000" loext:opacity="100%" fo:font-weight="bold" officeooo:rsid="000f6e48" officeooo:paragraph-rsid="000f8972" style:font-weight-asian="bold" style:font-weight-complex="bold"/>
    </style:style>
    <style:style style:name="P25" style:family="paragraph" style:parent-style-name="Standard">
      <style:paragraph-properties fo:text-align="end" style:justify-single-word="false"/>
      <style:text-properties fo:color="#000000" loext:opacity="100%" fo:font-weight="normal" officeooo:rsid="000e499b" officeooo:paragraph-rsid="000e499b" style:font-weight-asian="normal" style:font-weight-complex="normal"/>
    </style:style>
    <style:style style:name="P26" style:family="paragraph" style:parent-style-name="Standard">
      <style:paragraph-properties fo:text-align="end" style:justify-single-word="false"/>
      <style:text-properties fo:color="#000000" loext:opacity="100%" fo:font-style="italic" officeooo:rsid="000df5f6" officeooo:paragraph-rsid="000df5f6" style:font-style-asian="italic" style:font-style-complex="italic"/>
    </style:style>
    <style:style style:name="P27" style:family="paragraph" style:parent-style-name="Standard">
      <style:paragraph-properties fo:text-align="end" style:justify-single-word="false"/>
      <style:text-properties fo:color="#000000" loext:opacity="100%" fo:font-style="italic" fo:font-weight="bold" officeooo:rsid="000df5f6" officeooo:paragraph-rsid="000df5f6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end" style:justify-single-word="false"/>
      <style:text-properties officeooo:rsid="000edadf" officeooo:paragraph-rsid="000edadf"/>
    </style:style>
    <style:style style:name="P29" style:family="paragraph" style:parent-style-name="Standard">
      <style:paragraph-properties fo:text-align="end" style:justify-single-word="false"/>
      <style:text-properties officeooo:rsid="000edadf" officeooo:paragraph-rsid="000f608f"/>
    </style:style>
    <style:style style:name="P30" style:family="paragraph" style:parent-style-name="Standard" style:list-style-name="L4">
      <style:paragraph-properties fo:text-align="start" style:justify-single-word="false"/>
      <style:text-properties officeooo:rsid="000edadf" officeooo:paragraph-rsid="000edadf"/>
    </style:style>
    <style:style style:name="P31" style:family="paragraph" style:parent-style-name="Standard">
      <style:paragraph-properties fo:text-align="center" style:justify-single-word="false"/>
      <style:text-properties officeooo:rsid="000edadf" officeooo:paragraph-rsid="000edadf"/>
    </style:style>
    <style:style style:name="P32" style:family="paragraph" style:parent-style-name="Standard">
      <style:paragraph-properties fo:text-align="end" style:justify-single-word="false"/>
      <style:text-properties officeooo:rsid="000f608f" officeooo:paragraph-rsid="000f608f"/>
    </style:style>
    <style:style style:name="P33" style:family="paragraph" style:parent-style-name="Standard">
      <style:paragraph-properties fo:text-align="end" style:justify-single-word="false"/>
      <style:text-properties fo:font-style="italic" fo:font-weight="bold" officeooo:rsid="000f608f" officeooo:paragraph-rsid="000f608f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end" style:justify-single-word="false"/>
      <style:text-properties fo:font-style="italic" fo:font-weight="bold" officeooo:rsid="000f608f" officeooo:paragraph-rsid="000f6e48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end" style:justify-single-word="false"/>
      <style:text-properties officeooo:rsid="000f6e48" officeooo:paragraph-rsid="000f6e48"/>
    </style:style>
    <style:style style:name="P36" style:family="paragraph" style:parent-style-name="Standard">
      <style:paragraph-properties fo:text-align="end" style:justify-single-word="false"/>
      <style:text-properties officeooo:rsid="000f6e48" officeooo:paragraph-rsid="000f8972"/>
    </style:style>
    <style:style style:name="P37" style:family="paragraph" style:parent-style-name="Standard">
      <style:paragraph-properties fo:text-align="end" style:justify-single-word="false"/>
      <style:text-properties fo:font-style="normal" fo:font-weight="normal" officeooo:rsid="0010844f" officeooo:paragraph-rsid="0010844f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end" style:justify-single-word="false"/>
      <style:text-properties fo:font-style="normal" fo:font-weight="normal" officeooo:rsid="0011c2f0" officeooo:paragraph-rsid="0011c2f0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11c2f0" officeooo:paragraph-rsid="0011c2f0" style:font-style-asian="normal" style:font-weight-asian="normal" style:font-style-complex="normal" style:font-weight-complex="normal"/>
    </style:style>
    <style:style style:name="T1" style:family="text">
      <style:text-properties fo:color="#800080" loext:opacity="100%" fo:font-size="15pt" style:font-size-asian="13.1000003814697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0babb7"/>
    </style:style>
    <style:style style:name="T4" style:family="text">
      <style:text-properties fo:font-size="11pt" officeooo:rsid="000babb7" style:font-size-asian="9.60000038146973pt" style:font-size-complex="11pt"/>
    </style:style>
    <style:style style:name="T5" style:family="text">
      <style:text-properties fo:font-size="11pt" officeooo:rsid="000d5fca" style:font-size-asian="9.60000038146973pt" style:font-size-complex="11pt"/>
    </style:style>
    <style:style style:name="T6" style:family="text">
      <style:text-properties officeooo:rsid="000d5fca"/>
    </style:style>
    <style:style style:name="T7" style:family="text">
      <style:text-properties officeooo:rsid="000df5f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edadf"/>
    </style:style>
    <style:style style:name="T10" style:family="text">
      <style:text-properties officeooo:rsid="000f608f"/>
    </style:style>
    <style:style style:name="T11" style:family="text">
      <style:text-properties officeooo:rsid="000f6e48"/>
    </style:style>
    <style:style style:name="T12" style:family="text">
      <style:text-properties officeooo:rsid="000f8972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00" loext:opacity="100%" officeooo:rsid="0011c2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جامعة دمشق</text:span></text:p>
      <text:p text:style-name="P3">كلية الهندسة المعلوماتية </text:p>
      <text:p text:style-name="P4"><text:s text:c="3"/><text:span text:style-name="T2"><text:s text:c="2"/>مشروع مادة بروتوكولات الاتصالات الشبكية</text:span></text:p>
      <text:p text:style-name="P7"/>
      <text:p text:style-name="P6"/>
      <text:p text:style-name="P6">اعداد الطلاب <text:s text:c="5"/>أيهم محمود الحايك <text:s text:c="6"/>عبد الرحمن الضماد</text:p>
      <text:p text:style-name="P6"/>
      <text:p text:style-name="P6">عبد الرحمن الكفري <text:s text:c="12"/>جلال احسان كاخي <text:s text:c="21"/></text:p>
      <text:p text:style-name="P6"><text:s text:c="4"/></text:p>
      <text:p text:style-name="P6"/>
      <text:p text:style-name="P6"/>
      <text:p text:style-name="P8">مقدمة: يهدف المشروع الى بناء شبكة لشركة مكونة من فرع رئيسي <text:s/>موكون من <text:span text:style-name="T3">10 طوابق لكل طابق منهم شبكة مختلفة ,و ثلاث افرع خارجية لكل فرع طابق واحد وكل فرع من الارعة له شبكة مستقلة</text:span></text:p>
      <text:p text:style-name="P8"/>
      <text:p text:style-name="P8"/>
      <text:p text:style-name="P8"><text:s text:c="3"/><text:span text:style-name="T3">Cisco packet tracer <text:s/>: <text:s/></text:span>البيئة المستخدمة <text:s text:c="3"/></text:p>
      <text:p text:style-name="P8"/>
      <text:p text:style-name="P9"><text:s text:c="2"/>التقنيات الستخدمة </text:p>
      <text:list text:style-name="L1">
        <text:list-item>
          <text:p text:style-name="P10">ipv4 172.16.0.0 / 16 </text:p>
        </text:list-item>
        <text:list-item>
          <text:p text:style-name="P10">VLSM </text:p>
        </text:list-item>
        <text:list-item>
          <text:p text:style-name="P10">Vlan <text:s/></text:p>
        </text:list-item>
        <text:list-item>
          <text:p text:style-name="P11"><text:span text:style-name="T4">static routing <text:s/></text:span></text:p>
        </text:list-item>
        <text:list-item>
          <text:p text:style-name="P11"><text:span text:style-name="T4">inter </text:span><text:span text:style-name="T5">V</text:span><text:span text:style-name="T4">lan routing via </text:span><text:s/>Router-on-a-Stick</text:p>
        </text:list-item>
      </text:list>
      <text:p text:style-name="P5"/>
      <text:p text:style-name="P5"/>
      <text:p text:style-name="P5"/>
      <text:p text:style-name="P14">بنية الشبكة </text:p>
      <text:p text:style-name="P14"/>
      <text:p text:style-name="P14"/>
      <text:p text:style-name="P14"/>
      <text:p text:style-name="P15"/>
      <text:p text:style-name="P16"><draw:frame draw:style-name="fr4" draw:name="Image1" text:anchor-type="char" svg:width="6.611in" svg:height="4.5992in" draw:z-index="0"><draw:image xlink:href="Pictures/1000000100000492000003244A4468D6.png" xlink:type="simple" xlink:show="embed" xlink:actuate="onLoad" draw:mime-type="image/png"/></draw:frame>خطوات بناء الشبكة</text:p>
      <text:p text:style-name="P17"><text:s/>:على النحو التالي ip 172.16.0.0 /16 <text:s/>اولا توزيع ال<text:line-break/><text:line-break/> <text:s text:c="2"/><text:span text:style-name="T7"><text:s/>ان عنوان الشبكة 172.16.0.0 </text:span><text:s/><text:span text:style-name="T7">لا يمكننا التعديل عليه بافتراض انه قادم من مزود الانترنت و بالتالي نقوم بتقسيمه الى ما تحتاجه الشبكة فهي تحتاج الى اربع شبكات رئيسة و لكن حفاظا على امكانية التوسع لاحقا و كون العنوان يعطي وفرة من الاجهزة فقمسناه الى 8 شبكات رئيسية و استخدمنا منها حاليا اربعة على النحو التالي </text:span></text:p>
      <text:p text:style-name="P17"/>
      <text:p text:style-name="P2"><text:span text:style-name="T7">: يحتوي على </text:span></text:p>
      <text:p text:style-name="P2"/>
      <text:list text:style-name="L2">
        <text:list-item>
          <text:p text:style-name="P13"><text:span text:style-name="T7">172.16.0.0 <text:s/>/ 19 HQ main network [172.16.0.1 to 172.16.31.254] </text:span></text:p>
        </text:list-item>
        <text:list-item>
          <text:p text:style-name="P13"><text:span text:style-name="T7">172.16.32.0 /19 B1 main network [172.16.32.1 to 172.16.63.254]</text:span></text:p>
        </text:list-item>
        <text:list-item>
          <text:p text:style-name="P13"><text:span text:style-name="T7">172.16.64.0 /19 B2 main network [172.16.64.1 to 172.16.95.254]</text:span></text:p>
        </text:list-item>
        <text:list-item>
          <text:p text:style-name="P13"><text:span text:style-name="T7">172.16.96.0 /19 B3 main netwrok [172.16.96.1 to 172.16.127.254]</text:span></text:p>
        </text:list-item>
        <text:list-item>
          <text:p text:style-name="P13"><text:span text:style-name="T7">others network from 172.16.128.0 to 172.16.224.0 now is not used.</text:span></text:p>
          <text:p text:style-name="P13"/>
        </text:list-item>
      </text:list>
      <text:p text:style-name="P12"/>
      <text:p text:style-name="P12"/>
      <text:p text:style-name="P2"><text:span text:style-name="T7"><text:s text:c="159"/>بما ان الفرع الرئيسي يحتوي على 10 طوابق لكل طابق شبكة مستقلة معزولة عن الاخرى فقمنا بجعل كل طابق </text:span></text:p>
      <text:p text:style-name="P2"><text:span text:style-name="T7">vlan and sub network <text:line-break/> و التمكن من استخادم التوجيه بينهم L2 بقصد عزل الشبكة على مستوى ال L2 vlan تم استخدام <text:s/><text:line-break/></text:span></text:p>
      <text:p text:style-name="P2"><text:span text:style-name="T6"><text:s/>لذلك تم تقسيم الشبكة الرئيسية للفرع الرئيسي</text:span><text:span text:style-name="T7">19 </text:span><text:span text:style-name="T6">/ </text:span><text:span text:style-name="T7">172.16.0.0 <text:s/>لتستوعب ال 10 شبكات على النحو التالي <text:s/><text:line-break/><text:line-break/>فيتم توزيعه ليستوعب 16 شبكة و يكون القناع 23 <text:s/>bits نحتاج لتمثيل 10 شبكات الى 4 </text:span></text:p>
      <text:p text:style-name="P16"/>
      <text:p text:style-name="P2"><text:soft-page-break/><text:span text:style-name="T7"><text:s/>الشبكات كلها تشترك بنفس الانترفيس الفيزيائية على الرواتر لكن تم تقسيمها الا اترفيسات افتراضية ليتم التوجيه بينها </text:span>، Router-on-a-Stick<text:span text:style-name="T7">باستخدام الراوتر عبر ميزة <text:s/></text:span></text:p>
      <text:p text:style-name="P18"/>
      <text:list text:style-name="L3">
        <text:list-item>
          <text:p text:style-name="P19"><text:s/>Floor 1 : <text:s/>172.16.0.0 /23 <text:s/>vlan 10 [172.16.0.2 to 172.16.1.254]default gate way router sub interface G0/0/0.10 172.16.0.1</text:p>
        </text:list-item>
        <text:list-item>
          <text:p text:style-name="P19"><text:s/>Floor 2 : 172.16.2.0 /23 <text:s text:c="2"/>vlan <text:s/>20 [172.16.2.2 to 172.16.3.254] default gate way router sub interface G0/0/0.20 172.16.2.1</text:p>
        </text:list-item>
        <text:list-item>
          <text:p text:style-name="P19">Floor 3 : 172.16.4.0 /23 <text:s text:c="2"/>vlan <text:s/>30 [172.16.4.2 to 172.16.5.254] default gate way router sub interface G0/0/0.30 172.16.4.1</text:p>
        </text:list-item>
        <text:list-item>
          <text:p text:style-name="P19">Floor 4 : 172.16.6.0 /23 <text:s text:c="2"/>vlan <text:s/>40 [172.16.6.2 to 172.16.7.254] default gate way router sub interface G0/0/0.40 172.16.6.1</text:p>
        </text:list-item>
        <text:list-item>
          <text:p text:style-name="P19">to network Floor 10 : 172.16.18.0 /23 vlan 100 [172.16.18.2 to 172.16.9.254]default gate way router sub interface G0/0/0.100 172.16.18.1</text:p>
        </text:list-item>
      </text:list>
      <text:p text:style-name="P18"/>
      <text:p text:style-name="P22">ملاحظة : </text:p>
      <text:p text:style-name="P26"><text:s text:c="2"/><text:span text:style-name="T8">، Router-on-a-Stick لنستطيع ان نفصل بين الشبكات و نستخدم اما تقنية ال vlan لا بد من استخدام ال</text:span></text:p>
      <text:p text:style-name="P27"><text:s text:c="2"/>.l3 switch او ان نستخدم التوجيه عبر ال </text:p>
      <text:p text:style-name="P18"/>
      <text:p text:style-name="P20"/>
      <text:p text:style-name="P25">المرحلة الثانية التوصيلات و بناء هيكل الشبكة كما في بناء هيكل الشبكة في الاعلى<text:line-break/> <text:s text:c="2"/>كما في الصورة DTE Serial Links <text:s/>بين وصلات ال clock rate المرحلة الثالثة ضبط ال </text:p>
      <text:p text:style-name="P21"><text:span text:style-name="T9">serial links</text:span> <draw:frame draw:style-name="fr1" draw:name="Image2" text:anchor-type="char" svg:x="1.1429in" svg:y="0.6839in" svg:width="5.1484in" svg:height="3.5382in" draw:z-index="1"><draw:image xlink:href="Pictures/100000010000049200000324A23D23DE.png" xlink:type="simple" xlink:show="embed" xlink:actuate="onLoad" draw:mime-type="image/png"/></draw:frame><text:span text:style-name="T9">يتم ضبطها على طرفي الوصلة بين الراوترين فقط عند ال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<text:soft-page-break/>بما ان كل انترفيس من الروتر يجب ان تمثل شبكة مستقلة فهناك شبكات داخلية بين الموجهات و هي على النحو التالي </text:p>
      <text:p text:style-name="P28"/>
      <text:list text:style-name="L4">
        <text:list-item>
          <text:p text:style-name="P30">HQ &lt;=&gt; B1 : 10.10.12.0/30 <text:s text:c="2"/>HQ 10.10.12.2 <text:s text:c="2"/>B1 10.10.12.1 </text:p>
        </text:list-item>
        <text:list-item>
          <text:p text:style-name="P30">HQ &lt;=&gt; B2 : 10.10.10.0/30 <text:s text:c="2"/>HQ 10.10.10.2 <text:s text:c="2"/>B1 10.10.10.1 </text:p>
        </text:list-item>
        <text:list-item>
          <text:p text:style-name="P30">HQ &lt;=&gt; B3 : 10.10.8.0/30 <text:s text:c="2"/>HQ 10.10.8.2 <text:s text:c="2"/>B1 10.10.8.1 </text:p>
        </text:list-item>
      </text:list>
      <text:p text:style-name="P31"/>
      <text:p text:style-name="P31"/>
      <text:p text:style-name="P28"><text:s text:c="2"/>كما في الصورة routers <text:s/>من الشبكة نفسها ليتم التوجيه بين ال interfaces ipsبعدها يتم اعطاء ال<draw:frame draw:style-name="fr1" draw:name="Image3" text:anchor-type="char" svg:x="0.0563in" svg:y="0.3665in" svg:width="6.6929in" svg:height="3.0516in" draw:z-index="2"><draw:image xlink:href="Pictures/1000000100000685000002F9DBDF033C.png" xlink:type="simple" xlink:show="embed" xlink:actuate="onLoad" draw:mime-type="image/png"/></draw:frame> </text:p>
      <text:p text:style-name="P28"/>
      <text:p text:style-name="P29"><text:span text:style-name="T10">ضمنه switches</text:span> كما في الصورة و تكرارها على جميع ال <text:s text:c="2"/><text:span text:style-name="T10">HQ</text:span> في فرع ال vlans الخطوة الرابعة بناء ال<text:span text:style-name="T10"> </text:span></text:p>
      <text:p text:style-name="P29"><text:span text:style-name="T10"><text:s/></text:span><draw:frame draw:style-name="fr1" draw:name="Image4" text:anchor-type="char" svg:x="0.0457in" svg:y="0.1752in" svg:width="6.6929in" svg:height="3.3209in" draw:z-index="3"><draw:image xlink:href="Pictures/10000001000005BD000002D96D77E2FB.png" xlink:type="simple" xlink:show="embed" xlink:actuate="onLoad" draw:mime-type="image/png"/></draw:frame></text:p>
      <text:p text:style-name="P29"/>
      <text:p text:style-name="P29"/>
      <text:p text:style-name="P32"/>
      <text:p text:style-name="P32"/>
      <text:p text:style-name="P32"/>
      <text:p text:style-name="P32"/>
      <text:p text:style-name="P32"><text:soft-page-break/>declare vlans on uplink switch then activate mode trunk on uplink core switch to pass vlans tags </text:p>
      <text:p text:style-name="P32"/>
      <text:p text:style-name="P23">:ملاحظة</text:p>
      <text:p text:style-name="P33"/>
      <text:p text:style-name="P34">HQ uplink core switches <text:s/>يتم تعريفها فقط ضمن ال vlans ال <text:s/></text:p>
      <text:p text:style-name="P34"><text:span text:style-name="T11">trunk mode <text:s/>يجب ان تكون في uplink core switch ports </text:span>اما في بقية الافرع لا داعي لذلك و لكن ال<text:span text:style-name="T11"> </text:span></text:p>
      <text:p text:style-name="P32"/>
      <text:p text:style-name="P35"/>
      <text:p text:style-name="P32"/>
      <text:p text:style-name="P35"><draw:frame draw:style-name="fr3" draw:name="Image5" text:anchor-type="char" svg:width="6.6929in" svg:height="3.2307in" draw:z-index="4"><draw:image xlink:href="Pictures/100000010000061E000002F43FBB67DD.png" xlink:type="simple" xlink:show="embed" xlink:actuate="onLoad" draw:mime-type="image/png"/></draw:frame></text:p>
      <text:p text:style-name="P35"/>
      <text:p text:style-name="P35"/>
      <text:p text:style-name="P36"><text:span text:style-name="T12"><text:s/>distribute interface G0/0/0 to sub interfaces to make inter vlan routing and giv each sub enterface the encapsulation which same vlan number and gate way ip address from its network as the picture .</text:span></text:p>
      <text:p text:style-name="P36"/>
      <text:p text:style-name="P36"/>
      <text:p text:style-name="P24">:ملاحظة</text:p>
      <text:p text:style-name="P36"><text:s/><text:span text:style-name="T14">هذا السيناريو مطلوب فقط عند الفرع الرئيسي و ليس مطلوب في البقية اما عن البقية فيكفي اعطاء الانترفيس عنوان واحد من الشبكة المطلوبة كونه لن تحتوي سوى على شبكة واحدة و تم توزيع الانترفيسيز الداخلة الى شبكات الافرع عبر كور سويتش في حال اضطررنل اتقسيم الشبكة كما في الفرع الرئيسي و توزيع انترفيس الروتر و </text:span><draw:frame draw:style-name="fr1" draw:name="Image6" text:anchor-type="char" svg:x="0.4335in" svg:y="0.9882in" svg:width="6.05in" svg:height="2.9945in" draw:z-index="5"><draw:image xlink:href="Pictures/100000010000062E0000030FD91DEFC9.png" xlink:type="simple" xlink:show="embed" xlink:actuate="onLoad" draw:mime-type="image/png"/></draw:frame><text:span text:style-name="T14">استغلالها بطريقة صحيحة </text:span></text:p>
      <text:p text:style-name="P36"><text:soft-page-break/><text:span text:style-name="T14"/></text:p>
      <text:p text:style-name="P37"><text:span text:style-name="T13"><text:s/>sub interface 100 <text:s/>dot1q 100 <text:s/>ip address 172.16.18.1 255.255.254.0 <text:s/>يتم تطبيقه حتى ال </text:span></text:p>
      <text:p text:style-name="P37"><text:span text:style-name="T13"/></text:p>
      <text:p text:style-name="P37"><text:span text:style-name="T13"/></text:p>
      <text:p text:style-name="P37"><text:span text:style-name="T13">:الخطوة التالية </text:span></text:p>
      <text:p text:style-name="P37"><text:span text:style-name="T13">pools <text:s/>عبر الراوتر كما في الصورة سنأخذ مثال على الراوتر الرئيسي حيث انه يحتوى على عدة <text:s text:c="3"/>dhcp تفعيل </text:span></text:p>
      <text:p text:style-name="P37"><text:span text:style-name="T13">يتم التوزيع من خلالها كما في الصورة </text:span></text:p>
      <text:p text:style-name="P37"><draw:frame draw:style-name="fr1" draw:name="Image7" text:anchor-type="char" svg:x="0.589in" svg:y="0.1854in" svg:width="5.878in" svg:height="2.9091in" draw:z-index="6"><draw:image xlink:href="Pictures/100000010000062E0000030FEF0A58ED.png" xlink:type="simple" xlink:show="embed" xlink:actuate="onLoad" draw:mime-type="image/png"/></draw:frame><text:span text:style-name="T13"><text:s/></text:span><draw:frame draw:style-name="fr1" draw:name="Image8" text:anchor-type="char" svg:x="0.6945in" svg:y="3.4346in" svg:width="6.0591in" svg:height="2.9984in" draw:z-index="7"><draw:image xlink:href="Pictures/100000010000062E0000030F422B3340.png" xlink:type="simple" xlink:show="embed" xlink:actuate="onLoad" draw:mime-type="image/png"/></draw:frame><text:span text:style-name="T13">HQ <text:s text:c="2"/>التي هي الشبكة الاولى في <text:s/>vlan 10 <text:s text:c="2"/>هنا تم التوزيع لل </text:span></text:p>
      <text:p text:style-name="P37"><text:span text:style-name="T13"/></text:p>
      <text:p text:style-name="P37"><text:span text:style-name="T13">التوزيع يعمل </text:span></text:p>
      <text:p text:style-name="P37"><text:span text:style-name="T13"/></text:p>
      <text:p text:style-name="P37"><text:span text:style-name="T13"/></text:p>
      <text:p text:style-name="P37"><text:span text:style-name="T15">اي ان هناك راوتر مركزي يقوم <text:s/>Hub and Spoke بتطبيق سيناريو </text:span><text:span text:style-name="T13"><text:s/>Static Routing الخطوة الاخيرة تفعيل </text:span></text:p>
      <text:p text:style-name="P38"><text:span text:style-name="T13">بالتوزريع الى الشبكات الاخرى و كل رواتر طرفي يقوم بتمرير الترافيك الغريب مباشرة للراوتر المركزي بحالتنا هو راوتر ال HQ </text:span></text:p>
      <text:p text:style-name="P37"><text:span text:style-name="T13"/></text:p>
      <text:p text:style-name="P37"><draw:frame draw:style-name="fr2" draw:name="Image9" text:anchor-type="char" svg:width="6.6929in" svg:height="3.3126in" draw:z-index="8"><draw:image xlink:href="Pictures/100000010000062E0000030F0171180A.png" xlink:type="simple" xlink:show="embed" xlink:actuate="onLoad" draw:mime-type="image/png"/></draw:frame><text:soft-page-break/><text:span text:style-name="T13"/></text:p>
      <text:p text:style-name="P38"><text:span text:style-name="T13">عند البقية يوجد فقط route واحد و هو <text:line-break/>ip route 0.0.0.0 0.0.0.0 next hope to </text:span></text:p>
      <text:p text:style-name="P38"><text:span text:style-name="T13">HQ router </text:span></text:p>
      <text:p text:style-name="P38"/>
      <text:p text:style-name="P39"><text:span text:style-name="T13">test routing by ping between 172.16.0.11 HQ f1 to 172.16.32.14 B2</text:span></text:p>
      <text:p text:style-name="P37"><text:span text:style-name="T13"/></text:p>
      <text:p text:style-name="P37"><draw:frame draw:style-name="fr1" draw:name="Image10" text:anchor-type="char" svg:x="-0.0571in" svg:y="0.161in" svg:width="4.9252in" svg:height="2.4374in" draw:z-index="9"><draw:image xlink:href="Pictures/100000010000062E0000030F4C98961B.png" xlink:type="simple" xlink:show="embed" xlink:actuate="onLoad" draw:mime-type="image/png"/></draw:frame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9"><draw:frame draw:style-name="fr1" draw:name="Image11" text:anchor-type="char" svg:x="-0.1339in" svg:y="0.3827in" svg:width="5.9839in" svg:height="2.9618in" draw:z-index="10"><draw:image xlink:href="Pictures/100000010000062E0000030FCCD480B3.png" xlink:type="simple" xlink:show="embed" xlink:actuate="onLoad" draw:mime-type="image/png"/></draw:frame><text:span text:style-name="T13">test routing by ping between 172.16.32.14 B2 f1 to 172.16.96.14 B3</text:span></text:p>
      <text:p text:style-name="P39"><text:span text:style-name="T13"/></text:p>
      <text:p text:style-name="P39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6T15:14:31.060611412</meta:creation-date>
    <dc:date>2026-06-26T17:30:03.143559421</dc:date>
    <meta:editing-duration>PT4S</meta:editing-duration>
    <meta:editing-cycles>1</meta:editing-cycles>
    <meta:document-statistic meta:table-count="0" meta:image-count="11" meta:object-count="0" meta:page-count="7" meta:paragraph-count="64" meta:word-count="821" meta:character-count="4973" meta:non-whitespace-character-count="3884"/>
    <meta:generator>LibreOffice/24.2.7.2$Linux_X86_64 LibreOffice_project/420$Build-2</meta:generator>
  </office:meta>
</office:document-meta>
</file>